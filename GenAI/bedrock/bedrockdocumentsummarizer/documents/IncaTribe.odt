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With the ascension of Manco Capac to emperor of a tribe in the Cuzco area of what is modern-day Peru around 1200 BCE, the Incan civilization emerged as the largest Pre-Columbian empire in the Americas.</text:p>
      <text:p text:style-name="Text_20_body">Religion was significant in Inca life. The royal family were believed to be descendants of the Inca Sun God. Thus, the emperor had absolute authority, checked only by tradition. Under the emperors, a complex political structure was apparent. The Incan emperor, regional and village leaders, and others were part of an enormous bureaucracy. For every ten people, there was, on average, one official. The organization of the Empire also included a complex transportation infrastructure. To communicate across the entire empire, runners ran from village to village, relaying royal messages.</text:p>
      <text:p text:style-name="Text_20_body">In 1438, the ambitious Pachacuti, likely the greatest of the Incan emperors, came to the throne. Pachacuti rebuilt much of the capital city, Cuzco, and the Temple of the Sun. The success of Pachacuti was based upon his brilliant talent for military command (he is sometimes referred to as the "Napoleon of the Andes") and an amazing political campaign of integration. Leaders of regions that he wanted to conquer were bribed with luxury goods and enticed by promises of privilege and importance. As well, the Incans had developed a prestigious educational system which, not incidentally, just happened to extol the benefits of Incan civilization. Thus, much of the expansion throughout South America was peaceful.</text:p>
      <text:p text:style-name="Text_20_body">At its height of power in the late 15th century, Incan civilization had conquered a vast patchwork of languages, people and cultures from present-day Ecuador, along the whole length of South America, to present-day Argentina.Cuzco, the capital city, was said by the Spanish to be "as fine as any city in Spain". Perhaps the most impressive city of the Incan empire, though, was not its capital, Cuzco, but the city Machu Picchu.</text:p>
      <text:p text:style-name="Text_20_body">This mountain retreat was built high in the Andes and is sometimes called the "Lost City of the Incas." It was intended as a mountain retreat for the leaders of the Incan empire and demonstrates great artistry -- the abundant dry stone walls were entirely built without mortar, and the blocks were cut so carefully that one can't insert a knife-blade between them.</text:p>
      <text:p text:style-name="Text_20_body">The Spanish discovered the Inca during a civil war of succession and enjoyed great military superiority over the slow siege warfare that the Incan empire had employed against its enemies. Fueled by greed at the opportunity to plunder another rich civilization, they conquered and executed the Incan emperor. The Incan empire fell quickly in 1533, but a small resistance force fled to the mountains, waging a guerrilla war of resistance for another 39 year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4T21:52:36.730466704</meta:creation-date>
    <dc:date>2025-11-24T21:53:17.752563732</dc:date>
    <meta:editing-duration>PT41S</meta:editing-duration>
    <meta:editing-cycles>1</meta:editing-cycles>
    <meta:document-statistic meta:table-count="0" meta:image-count="0" meta:object-count="0" meta:page-count="1" meta:paragraph-count="6" meta:word-count="447" meta:character-count="2751" meta:non-whitespace-character-count="2309"/>
    <meta:generator>LibreOffice/24.2.7.2$Linux_X86_64 LibreOffice_project/420$Build-2</meta:generator>
  </office:meta>
</office:document-meta>
</file>