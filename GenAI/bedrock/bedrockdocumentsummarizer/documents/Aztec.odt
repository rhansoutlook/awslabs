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7"/>The Aztec culture began with the migration of the Mexica people to present-day central Mexico. The leaders of this group of people created an alliance with the dominant tribes forming the Aztec triple alliance, and created an empire that influenced much of present-day Mexico.</text:p>
      <text:p text:style-name="Text_20_body">The Aztec confederacy began a campaign of conquest and assimilation. Outlying lands were inducted into the empire and became part of the complex Aztec society. Local leaders could gain prestige by adopting and adding to the culture of the Aztec civilization. The Aztecs, in turn, adopted cultural, artistic, and astronomical innovations from its conquered people.</text:p>
      <text:p text:style-name="Text_20_body">The heart of Aztec power was economic unity. Conquered lands paid tribute to the capital city Tenochtitlan, the present-day site of Mexico City. Rich in tribute, this capital grew in influence, size, and population. When the Spanish arrived in 1521, it was the fourth largest city in the world (including the once independent city Tlatelolco, which was by then a residential suburb) with an estimated population of 212,500 people. It contained the massive Temple de Mayo (a twin-towered pyramid 197 feet tall), 45 public buildings, a palace, two zoos, a botanical garden, and many houses. Surrounding the city and floating on the shallow flats of Lake Texcoco were enormous chinampas -- floating garden beds that fed the many thousands of residents of Tenochtitlan.</text:p>
      <text:p text:style-name="Text_20_body">While many Meso-American civilizations practiced human sacrifice, none performed it to the scale of the Aztecs. To the Aztecs, human sacrifice was a necessary appeasement to the gods. According to their own records, one of the largest slaughters ever performed happened when the great pyramid of Tenochtitlan was reconsecrated in 1487. The Aztecs reported that they had sacrificed 84,400 prisoners over the course of four days.</text:p>
      <text:p text:style-name="Text_20_body">With their arrival at Tenochtitlan, the Spanish would be the downfall of Aztec culture. Although shocked and impressed by the scale of Tenochtitlan, the display of massive human sacrifice offended European sensitivity, and the abundant displays of gold and silver inflamed their greed. The Spanish killed the reigning ruler, Montezuma in June 1520 and lay siege to the city, destroying it in 1521, aided by their alliance with a competing tribe, the Tlaxcal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21:53:35.259485838</meta:creation-date>
    <dc:date>2025-11-24T21:55:32.822069441</dc:date>
    <meta:editing-duration>PT1M58S</meta:editing-duration>
    <meta:editing-cycles>1</meta:editing-cycles>
    <meta:document-statistic meta:table-count="0" meta:image-count="0" meta:object-count="0" meta:page-count="1" meta:paragraph-count="5" meta:word-count="361" meta:character-count="2307" meta:non-whitespace-character-count="1934"/>
    <meta:generator>LibreOffice/24.2.7.2$Linux_X86_64 LibreOffice_project/420$Build-2</meta:generator>
  </office:meta>
</office:document-meta>
</file>